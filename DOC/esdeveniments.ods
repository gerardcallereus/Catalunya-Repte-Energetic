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696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11.966cm"/>
    </style:style>
    <style:style style:name="co4" style:family="table-column">
      <style:table-column-properties fo:break-before="auto" style:column-width="4.53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3.358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14.5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deveni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vent_Title</text:p>
          </table:table-cell>
          <table:table-cell office:value-type="string" calcext:value-type="string">
            <text:p>Event_Category</text:p>
          </table:table-cell>
          <table:table-cell office:value-type="string" calcext:value-type="string">
            <text:p>Decision_Text</text:p>
          </table:table-cell>
          <table:table-cell office:value-type="string" calcext:value-type="string">
            <text:p>Budget_Impact_One_Time</text:p>
          </table:table-cell>
          <table:table-cell office:value-type="string" calcext:value-type="string">
            <text:p>Citizen_Approval</text:p>
          </table:table-cell>
          <table:table-cell office:value-type="string" calcext:value-type="string">
            <text:p>Business_Approval</text:p>
          </table:table-cell>
          <table:table-cell office:value-type="string" calcext:value-type="string">
            <text:p>Political_Approval</text:p>
          </table:table-cell>
          <table:table-cell office:value-type="string" calcext:value-type="string">
            <text:p>Environmentalist_Approval</text:p>
          </table:table-cell>
          <table:table-cell office:value-type="string" calcext:value-type="string">
            <text:p>Other_Effects_Description</text:p>
          </table:table-cell>
        </table:table-row>
        <table:table-row table:style-name="ro1">
          <table:table-cell office:value-type="string" calcext:value-type="string">
            <text:p>Onada de Turisme Rècord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Celebrar l'èxit i assumir el cost energèt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 demanda energètica base puja un 10% durant 1 trimestre.</text:p>
          </table:table-cell>
        </table:table-row>
        <table:table-row table:style-name="ro1">
          <table:table-cell office:value-type="string" calcext:value-type="string">
            <text:p>Onada de Turisme Rècord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Llançar campanya de conscienciació per a l'estalvi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olatilitat Extrema al Mercat Europeu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Mantenir-se exposat al mercat lliu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u de venda d'excedent x1.5, Preu de compra de dèficit x2.0.</text:p>
          </table:table-cell>
        </table:table-row>
        <table:table-row table:style-name="ro1">
          <table:table-cell office:value-type="string" calcext:value-type="string">
            <text:p>Volatilitat Extrema al Mercat Europeu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Negociar un preu fix temporal (Cost: 200 M€)</text:p>
          </table:table-cell>
          <table:table-cell office:value-type="float" office:value="-200" calcext:value-type="float">
            <text:p>-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oballa Arqueològica Inesperada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Aturar les obres i reubicar el projecte (Cost: +50% al cost original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ost de la central en construcció augmenta un 50%.</text:p>
          </table:table-cell>
        </table:table-row>
        <table:table-row table:style-name="ro1">
          <table:table-cell office:value-type="string" calcext:value-type="string">
            <text:p>Troballa Arqueològica Inesperada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Continuar les obres. El progrés no es pot aturar.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Preocupació per la Seguretat Nuclear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Invertir en una auditoria externa i millores (Cost: 800 M€)</text:p>
          </table:table-cell>
          <table:table-cell office:value-type="float" office:value="-800" calcext:value-type="float">
            <text:p>-8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ocupació per la Seguretat Nuclear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Negar les acusacions i continuar com fins ara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a el risc de manteniment nuclear (nuclearMaintenanceRisk).</text:p>
          </table:table-cell>
        </table:table-row>
        <table:table-row table:style-name="ro1">
          <table:table-cell office:value-type="string" calcext:value-type="string">
            <text:p>El Cementiri de Residus Nuclears està Ple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Construir un nou magatzem (Cost: 2.000 M€)</text:p>
          </table:table-cell>
          <table:table-cell office:value-type="float" office:value="-2000" calcext:value-type="float">
            <text:p>-200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El Cementiri de Residus Nuclears està Ple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Pagar a França per a que gestioni els resid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menta les despeses recurrents en 150 M€/trimestre.</text:p>
          </table:table-cell>
        </table:table-row>
        <table:table-row table:style-name="ro1">
          <table:table-cell office:value-type="string" calcext:value-type="string">
            <text:p>Protestes per l'Ocupació de Sòl Agrícola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Crear un fons de compensació per als agricultors (Cost: 400 M€)</text:p>
          </table:table-cell>
          <table:table-cell office:value-type="float" office:value="-400" calcext:value-type="float">
            <text:p>-4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testes per l'Ocupació de Sòl Agrícola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Prioritzar la producció energètica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string" calcext:value-type="string">
            <text:p>Rebuig Veïnal a un Parc Eòlic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Negociar i invertir en millores per al municipi (Cost: 300 M€)</text:p>
          </table:table-cell>
          <table:table-cell office:value-type="float" office:value="-300" calcext:value-type="float">
            <text:p>-3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buig Veïnal a un Parc Eòlic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Imposar el projecte. L'interès general preval.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ixes per les Olors d'una Planta de Biomassa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Instal·lar els nous filtres (Cost: 150 M€)</text:p>
          </table:table-cell>
          <table:table-cell office:value-type="float" office:value="-150" calcext:value-type="float">
            <text:p>-1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ixes per les Olors d'una Planta de Biomassa</text:p>
          </table:table-cell>
          <table:table-cell office:value-type="string" calcext:value-type="string">
            <text:p>Reacció a Construcció</text:p>
          </table:table-cell>
          <table:table-cell office:value-type="string" calcext:value-type="string">
            <text:p>Argumentar que la planta compleix la normativa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vertència de la Unió Europea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Ignorar l'advertència, la indústria és priorità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Advertència de la Unió Europea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Crear un pla per contaminar menys (Cost: 250 M€)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nció de la Unió Europea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Acceptar la multa i pagar (Cost: 1.500 M€)</text:p>
          </table:table-cell>
          <table:table-cell office:value-type="float" office:value="-1500" calcext:value-type="float">
            <text:p>-1500</text:p>
          </table:table-cell>
          <table:table-cell table:number-columns-repeated="4"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Manifestació Massiva pel Clima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Ignorar la protesta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string" calcext:value-type="string">
            <text:p>Manifestació Massiva pel Clima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Reunir-se amb els líders i prometre més inversions verdes (Cost: 500 M€)</text:p>
          </table:table-cell>
          <table:table-cell office:value-type="float" office:value="-500" calcext:value-type="float">
            <text:p>-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jecte d'Ampliació de l'Aeroport del Prat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Donar suport total a l'ampliació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Projecte d'Ampliació de l'Aeroport del Prat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Rebutjar l'ampliació i protegir La Ricar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ojecte d'Ampliació de l'Aeroport del Prat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Ampliació Sostenible (amb Compensació Ecològica) (Cost: 1.200 M€)</text:p>
          </table:table-cell>
          <table:table-cell office:value-type="float" office:value="-1200" calcext:value-type="float">
            <text:p>-120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string" calcext:value-type="string">
            <text:p>Projecte d'Ampliació de l'Aeroport del Prat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Convocar un Referèndum Ciutad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resultat final serà aleatori entre les altres opcions.</text:p>
          </table:table-cell>
        </table:table-row>
        <table:table-row table:style-name="ro1">
          <table:table-cell office:value-type="string" calcext:value-type="string">
            <text:p>Reconeixement Internacional per la Reducció de CO₂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Acceptar el reconeixement amb humilita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risi: Fuga de Capitals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Llançar un paquet d'incentius fiscals urgent (Cost: 1.800 M€)</text:p>
          </table:table-cell>
          <table:table-cell office:value-type="float" office:value="-1800" calcext:value-type="float">
            <text:p>-18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isi: Fuga de Capitals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No cedir al 'xantatge' empresar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ueix els ingressos per impostos un 30% de forma permanent.</text:p>
          </table:table-cell>
        </table:table-row>
        <table:table-row table:style-name="ro1">
          <table:table-cell office:value-type="string" calcext:value-type="string">
            <text:p>Crisi: Ofensiva Legal Ecologista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Crear un fons de compensació mediambiental (Cost: 1.000 M€)</text:p>
          </table:table-cell>
          <table:table-cell office:value-type="float" office:value="-1000" calcext:value-type="float">
            <text:p>-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risi: Ofensiva Legal Ecologista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Lluitar als tribunal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loqueja la construcció de TOTES les centrals durant 4 trimestres.</text:p>
          </table:table-cell>
        </table:table-row>
        <table:table-row table:style-name="ro1">
          <table:table-cell office:value-type="string" calcext:value-type="string">
            <text:p>Crisi: Moció de Censura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Negociar suports a canvi de concessions (Cost: 750 M€)</text:p>
          </table:table-cell>
          <table:table-cell office:value-type="float" office:value="-750" calcext:value-type="float">
            <text:p>-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isi: Moció de Censura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Sotmetre's a la votació sense negocia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isi: Vaga General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Negociar un paquet de mesures socials (Cost: 1.200 M€)</text:p>
          </table:table-cell>
          <table:table-cell office:value-type="float" office:value="-1200" calcext:value-type="float">
            <text:p>-12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isi: Vaga General</text:p>
          </table:table-cell>
          <table:table-cell office:value-type="string" calcext:value-type="string">
            <text:p>Crisi Governamental</text:p>
          </table:table-cell>
          <table:table-cell office:value-type="string" calcext:value-type="string">
            <text:p>Aguantar el pols i no cedir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ueix la demanda un 20% durant 2 trimestres.</text:p>
          </table:table-cell>
        </table:table-row>
        <table:table-row table:style-name="ro1">
          <table:table-cell office:value-type="string" calcext:value-type="string">
            <text:p>Avaria Inesperada a [Nom Central]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Entesos, procedir amb la reparació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a central afectada queda fora de servei durant 1 trimestre.</text:p>
          </table:table-cell>
        </table:table-row>
        <table:table-row table:style-name="ro1">
          <table:table-cell office:value-type="string" calcext:value-type="string">
            <text:p>Sequera Històrica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Decretar restriccions d'aigua a la indústria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ueix la demanda un 5% durant 2 trimestres.</text:p>
          </table:table-cell>
        </table:table-row>
        <table:table-row table:style-name="ro1">
          <table:table-cell office:value-type="string" calcext:value-type="string">
            <text:p>Sequera Històrica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Assumir el cost de la baixa producció hidràulica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ga General Industrial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Mediar en el conflicte (Cost: 350 M€)</text:p>
          </table:table-cell>
          <table:table-cell office:value-type="float" office:value="-350" calcext:value-type="float">
            <text:p>-3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ga General Industrial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No intervenir i esperar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 demanda es mantindrà un 15% més baixa durant 2 trimestres.</text:p>
          </table:table-cell>
        </table:table-row>
        <table:table-row table:style-name="ro1">
          <table:table-cell office:value-type="string" calcext:value-type="string">
            <text:p>Crisi de Materials per a Renovables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Assumir el sobrecost i continuar invert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ost de construcció de centrals solars i eòliques augmenta un 25% durant 4 trimestres.</text:p>
          </table:table-cell>
        </table:table-row>
        <table:table-row table:style-name="ro1">
          <table:table-cell office:value-type="string" calcext:value-type="string">
            <text:p>Crisi de Materials per a Renovables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Aturar les inversions en renovables temporal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loqueja la construcció de centrals solars i eòliques durant 2 trimestres.</text:p>
          </table:table-cell>
        </table:table-row>
        <table:table-row table:style-name="ro1">
          <table:table-cell office:value-type="string" calcext:value-type="string">
            <text:p>Pujada del Preu del Gas Natural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Subvencionar el preu per a la indústria (Cost: 600 M€)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Pujada del Preu del Gas Natural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No intervenir i deixar que el mercat actuï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 cost de manteniment de les centrals de gas augmenta un 50% durant 3 trimestres.</text:p>
          </table:table-cell>
        </table:table-row>
        <table:table-row table:style-name="ro1">
          <table:table-cell office:value-type="string" calcext:value-type="string">
            <text:p>Incendi Forestal Gegant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Decretar l'aturada de les plantes de biomassa per ris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tura la producció de totes les plantes de biomassa durant 1 trimestre.</text:p>
          </table:table-cell>
        </table:table-row>
        <table:table-row table:style-name="ro1">
          <table:table-cell office:value-type="string" calcext:value-type="string">
            <text:p>Incendi Forestal Gegant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Mantenir l'operativa amb mesures extremes de seguretat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Temporal Marítim Devastador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Iniciar reparacions urgents (Cost: 450 M€)</text:p>
          </table:table-cell>
          <table:table-cell office:value-type="float" office:value="-450" calcext:value-type="float">
            <text:p>-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oral Marítim Devastador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Esperar a les ajudes de l'Est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Les centrals eòliques (marines i terrestres) produeixen un 50% menys durant 2 trimestres.</text:p>
          </table:table-cell>
        </table:table-row>
        <table:table-row table:style-name="ro1">
          <table:table-cell office:value-type="string" calcext:value-type="string">
            <text:p>Hivern Anormalment Suau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Celebrar l'estalvi en calefacció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a demanda energètica baixa un 10% aquest trimestre.</text:p>
          </table:table-cell>
        </table:table-row>
        <table:table-row table:style-name="ro1">
          <table:table-cell office:value-type="string" calcext:value-type="string">
            <text:p>Hivern Anormalment Suau</text:p>
          </table:table-cell>
          <table:table-cell office:value-type="string" calcext:value-type="string">
            <text:p>Clima i Desastres</text:p>
          </table:table-cell>
          <table:table-cell office:value-type="string" calcext:value-type="string">
            <text:p>Invertir els estalvis en eficiència (Cost: 200 M€)</text:p>
          </table:table-cell>
          <table:table-cell office:value-type="float" office:value="-200" calcext:value-type="float">
            <text:p>-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demanda base es redueix permanentment en 30MW.</text:p>
          </table:table-cell>
        </table:table-row>
        <table:table-row table:style-name="ro1">
          <table:table-cell office:value-type="string" calcext:value-type="string">
            <text:p>Projecte Pilot d'Eòlica Marina Flotant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Invertir en el projecte (Cost: 1.000 M€)</text:p>
          </table:table-cell>
          <table:table-cell office:value-type="float" office:value="-1000" calcext:value-type="float">
            <text:p>-1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bloqueja la construcció de centrals d'Eòlica Marina.</text:p>
          </table:table-cell>
        </table:table-row>
        <table:table-row table:style-name="ro1">
          <table:table-cell office:value-type="string" calcext:value-type="string">
            <text:p>Projecte Pilot d'Eòlica Marina Flotant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Considerar-ho massa arrisc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enç en l'Emmagatzematge Tèrmic Solar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Finançar el desenvolupament (Cost: 1.200 M€)</text:p>
          </table:table-cell>
          <table:table-cell office:value-type="float" office:value="-1200" calcext:value-type="float">
            <text:p>-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bloqueja la construcció de centrals Termosolars.</text:p>
          </table:table-cell>
        </table:table-row>
        <table:table-row table:style-name="ro1">
          <table:table-cell office:value-type="string" calcext:value-type="string">
            <text:p>Avenç en l'Emmagatzematge Tèrmic Solar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Esperar que la tecnologia madu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ord Europeu de Desnuclearització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Acceptar i tancar Ascó I (Cost: 1.500 M€)</text:p>
          </table:table-cell>
          <table:table-cell office:value-type="float" office:value="-1500" calcext:value-type="float">
            <text:p>-1500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ausura permanent de la central Ascó I.</text:p>
          </table:table-cell>
        </table:table-row>
        <table:table-row table:style-name="ro1">
          <table:table-cell office:value-type="string" calcext:value-type="string">
            <text:p>Acord Europeu de Desnuclearització</text:p>
          </table:table-cell>
          <table:table-cell office:value-type="string" calcext:value-type="string">
            <text:p>Política i Societat</text:p>
          </table:table-cell>
          <table:table-cell office:value-type="string" calcext:value-type="string">
            <text:p>Rebutjar l'acord i defensar la sobirania energètica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Revisió de Seguretat a una Nuclear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Fer una aturada completa per revisió (Cost: 400 M€)</text:p>
          </table:table-cell>
          <table:table-cell office:value-type="float" office:value="-400" calcext:value-type="float">
            <text:p>-4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central Vandellòs II s'atura durant 1 trimestre.</text:p>
          </table:table-cell>
        </table:table-row>
        <table:table-row table:style-name="ro1">
          <table:table-cell office:value-type="string" calcext:value-type="string">
            <text:p>Revisió de Seguretat a una Nuclear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Fer revisions parcials sense aturar la producció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tiva el risc de manteniment nuclear (nuclearMaintenanceRisk).</text:p>
          </table:table-cell>
        </table:table-row>
        <table:table-row table:style-name="ro1">
          <table:table-cell office:value-type="string" calcext:value-type="string">
            <text:p>Acord d'Importació de Residus per a Biomassa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Acceptar l'acor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Acord d'Importació de Residus per a Biomassa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Rebutjar l'acord per motius ecològic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portunitat d'Inversió en Bateries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Invertir massivament (Cost: 2.000 M€)</text:p>
          </table:table-cell>
          <table:table-cell office:value-type="float" office:value="-2000" calcext:value-type="float">
            <text:p>-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producció de Solar i Eòlica augmenta un 20% permanentment.</text:p>
          </table:table-cell>
        </table:table-row>
        <table:table-row table:style-name="ro1">
          <table:table-cell office:value-type="string" calcext:value-type="string">
            <text:p>Oportunitat d'Inversió en Bateries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Descartar la inversió per l'alt co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Oportunitat de Projecte d'Hidrogen Verd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Apostar per l'hidrogen (Cost: 1.300 M€)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 manteniment de les centrals de gas es redueix un 25% permanentment.</text:p>
          </table:table-cell>
        </table:table-row>
        <table:table-row table:style-name="ro1">
          <table:table-cell office:value-type="string" calcext:value-type="string">
            <text:p>Oportunitat de Projecte d'Hidrogen Verd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Centrar-se en tecnologies més madu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Oportunitat: Millora Tecnològica en Plaques Solars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Invertir en la nova tecnologia (Cost: 850 M€)</text:p>
          </table:table-cell>
          <table:table-cell office:value-type="float" office:value="-850" calcext:value-type="float">
            <text:p>-8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producció de les centrals solars augmenta un 15% permanentment.</text:p>
          </table:table-cell>
        </table:table-row>
        <table:table-row table:style-name="ro1">
          <table:table-cell office:value-type="string" calcext:value-type="string">
            <text:p>Oportunitat: Millora Tecnològica en Plaques Solars</text:p>
          </table:table-cell>
          <table:table-cell office:value-type="string" calcext:value-type="string">
            <text:p>Tecnologia i Indústria</text:p>
          </table:table-cell>
          <table:table-cell office:value-type="string" calcext:value-type="string">
            <text:p>Mantenir la tecnologia actual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venció per a la Bioeconomia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Acceptar la subvenció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venció per a la Bioeconomia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No acceptar-la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venció Inesperada de la UE per a Eficiència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Destinar-la a la rehabilitació d'edificis</text:p>
          </table:table-cell>
          <table:table-cell office:value-type="float" office:value="-700" calcext:value-type="float">
            <text:p>-7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 demanda base es redueix permanentment en 80MW.</text:p>
          </table:table-cell>
        </table:table-row>
        <table:table-row table:style-name="ro1">
          <table:table-cell office:value-type="string" calcext:value-type="string">
            <text:p>Subvenció Inesperada de la UE per a Eficiència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Injectar els diners al pressupost general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om de l'Autoconsum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Accelerar el model amb ajudes públiques (Cost: 400 M€)</text:p>
          </table:table-cell>
          <table:table-cell office:value-type="float" office:value="-400" calcext:value-type="float">
            <text:p>-4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demanda base es redueix permanentment en 120MW.</text:p>
          </table:table-cell>
        </table:table-row>
        <table:table-row table:style-name="ro1">
          <table:table-cell office:value-type="string" calcext:value-type="string">
            <text:p>Boom de l'Autoconsum</text:p>
          </table:table-cell>
          <table:table-cell office:value-type="string" calcext:value-type="string">
            <text:p>Economia i Mercat</text:p>
          </table:table-cell>
          <table:table-cell office:value-type="string" calcext:value-type="string">
            <text:p>Deixar que el mercat es reguli s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 demanda base es redueix permanentment en 40MW.</text:p>
          </table:table-cell>
        </table:table-row>
        <table:table-row table:style-name="ro1">
          <table:table-cell table:number-columns-repeated="3"/>
          <table:table-cell table:formula="of:=SUM([.D2:.D72])" office:value-type="float" office:value="-21750" calcext:value-type="float">
            <text:p>-21750</text:p>
          </table:table-cell>
          <table:table-cell table:formula="of:=SUM([.E2:.E72])" office:value-type="float" office:value="-29" calcext:value-type="float">
            <text:p>-29</text:p>
          </table:table-cell>
          <table:table-cell table:formula="of:=SUM([.F2:.F72])" office:value-type="float" office:value="-16" calcext:value-type="float">
            <text:p>-16</text:p>
          </table:table-cell>
          <table:table-cell table:formula="of:=SUM([.G2:.G72])" office:value-type="float" office:value="9" calcext:value-type="float">
            <text:p>9</text:p>
          </table:table-cell>
          <table:table-cell table:formula="of:=SUM([.H2:.H72])" office:value-type="float" office:value="-4" calcext:value-type="float">
            <text:p>-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31T20:16:11.523059795</dc:date>
    <meta:editing-duration>PT1M44S</meta:editing-duration>
    <meta:editing-cycles>1</meta:editing-cycles>
    <meta:document-statistic meta:table-count="1" meta:cell-count="612" meta:object-count="0"/>
    <meta:generator>LibreOffice/24.2.7.2$Linux_X86_64 LibreOffice_project/420$Build-2</meta:generator>
  </office:meta>
</office:document-meta>
</file>